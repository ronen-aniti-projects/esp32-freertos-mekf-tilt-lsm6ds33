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Ubuntu" svg:font-family="Ubuntu, sans-serif"/>
  </office:font-face-decls>
  <office:automatic-styles>
    <style:style style:name="P1" style:family="paragraph" style:parent-style-name="Heading_20_1">
      <style:paragraph-properties fo:margin-left="0in" fo:margin-right="0in" fo:margin-top="0.278in" fo:margin-bottom="0.0835in" style:contextual-spacing="false" fo:line-height="138%" fo:text-indent="0in" style:auto-text-indent="false" style:writing-mode="lr-tb"/>
      <style:text-properties fo:font-variant="normal" fo:text-transform="none" fo:color="#000000" loext:opacity="100%" style:text-line-through-style="none" style:text-line-through-type="none" style:font-name="Ubuntu" fo:font-size="20pt" fo:font-style="normal" style:text-underline-style="none" fo:font-weight="normal" style:text-blinking="false" fo:background-color="transparent"/>
    </style:style>
    <style:style style:name="P2" style:family="paragraph" style:parent-style-name="Heading_20_1">
      <style:text-properties fo:font-variant="normal" fo:text-transform="none" fo:color="#000000" loext:opacity="100%" style:text-line-through-style="none" style:text-line-through-type="none" style:font-name="Ubuntu" fo:font-size="20pt" fo:font-style="normal" style:text-underline-style="none" fo:font-weight="normal" officeooo:rsid="000d1c02" officeooo:paragraph-rsid="000d1c02" style:text-blinking="false" fo:background-color="transparent"/>
    </style:style>
    <style:style style:name="P3" style:family="paragraph" style:parent-style-name="Standard">
      <style:text-properties officeooo:rsid="000d1c02" officeooo:paragraph-rsid="000d1c02"/>
    </style:style>
    <style:style style:name="P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5"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0d1c02" officeooo:paragraph-rsid="000d1c02" fo:background-color="#ffffff"/>
    </style:style>
    <style:style style:name="P6" style:family="paragraph" style:parent-style-name="Standard">
      <style:paragraph-properties style:line-height-at-least="0.198in"/>
      <style:text-properties fo:color="#3b3b3b" loext:opacity="100%" style:font-name="Droid Sans Mono" fo:font-size="10.5pt" fo:font-weight="normal" officeooo:rsid="000d1c02" officeooo:paragraph-rsid="000d1c02" fo:background-color="#ffffff"/>
    </style:style>
    <style:style style:name="P7" style:family="paragraph" style:parent-style-name="Standard" style:list-style-name="L4">
      <style:paragraph-properties style:line-height-at-least="0.198in"/>
      <style:text-properties fo:color="#3b3b3b" loext:opacity="100%" style:font-name="Droid Sans Mono" fo:font-size="10.5pt" fo:font-weight="normal" officeooo:rsid="000d1c02" officeooo:paragraph-rsid="000d1c02" fo:background-color="#ffffff"/>
    </style:style>
    <style:style style:name="P8" style:family="paragraph" style:parent-style-name="Standard" style:list-style-name="L4">
      <style:paragraph-properties style:line-height-at-least="0.198in"/>
      <style:text-properties fo:color="#3b3b3b" loext:opacity="100%" style:font-name="Droid Sans Mono" fo:font-size="10.5pt" fo:font-weight="normal" officeooo:rsid="000d4d67" officeooo:paragraph-rsid="000d4d67" fo:background-color="#ffffff"/>
    </style:style>
    <style:style style:name="P9" style:family="paragraph" style:parent-style-name="Standard" style:list-style-name="L4">
      <style:paragraph-properties style:line-height-at-least="0.198in"/>
      <style:text-properties fo:color="#3b3b3b" loext:opacity="100%" style:font-name="Droid Sans Mono" fo:font-size="10.5pt" fo:font-weight="normal" officeooo:rsid="000d4d67" officeooo:paragraph-rsid="000e01d4" fo:background-color="#ffffff"/>
    </style:style>
    <style:style style:name="P10" style:family="paragraph" style:parent-style-name="Standard" style:list-style-name="L4">
      <style:paragraph-properties style:line-height-at-least="0.198in"/>
      <style:text-properties fo:color="#3b3b3b" loext:opacity="100%" style:font-name="Droid Sans Mono" fo:font-size="10.5pt" fo:font-weight="normal" officeooo:rsid="000e01d4" officeooo:paragraph-rsid="000e01d4" fo:background-color="#ffffff"/>
    </style:style>
    <style:style style:name="P1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0e01d4" officeooo:paragraph-rsid="000e01d4" fo:background-color="#ffffff"/>
    </style:style>
    <style:style style:name="P12" style:family="paragraph" style:parent-style-name="Standard" style:list-style-name="L4">
      <style:paragraph-properties style:line-height-at-least="0.198in"/>
      <style:text-properties fo:color="#3b3b3b" loext:opacity="100%" style:font-name="Droid Sans Mono" fo:font-size="10.5pt" fo:font-weight="normal" officeooo:rsid="000ff90a" officeooo:paragraph-rsid="000ff90a" fo:background-color="#ffffff"/>
    </style:style>
    <style:style style:name="P13" style:family="paragraph" style:parent-style-name="Standard" style:list-style-name="L4">
      <style:paragraph-properties style:line-height-at-least="0.198in"/>
      <style:text-properties fo:color="#3b3b3b" loext:opacity="100%" style:font-name="Droid Sans Mono" fo:font-size="10.5pt" fo:font-weight="normal" officeooo:rsid="001278fc" officeooo:paragraph-rsid="001278fc" fo:background-color="#ffffff"/>
    </style:style>
    <style:style style:name="P14" style:family="paragraph" style:parent-style-name="Standard" style:list-style-name="L4">
      <style:paragraph-properties style:line-height-at-least="0.198in"/>
      <style:text-properties fo:color="#3b3b3b" loext:opacity="100%" style:font-name="Droid Sans Mono" fo:font-size="10.5pt" fo:font-weight="normal" officeooo:rsid="0012c62a" officeooo:paragraph-rsid="0012c62a" fo:background-color="#ffffff"/>
    </style:style>
    <style:style style:name="P15" style:family="paragraph" style:parent-style-name="Standard">
      <style:paragraph-properties style:line-height-at-least="0.198in"/>
      <style:text-properties fo:color="#3b3b3b" loext:opacity="100%" style:font-name="Droid Sans Mono" fo:font-size="10.5pt" fo:font-weight="normal" officeooo:rsid="0012c62a" officeooo:paragraph-rsid="0012c62a" fo:background-color="#ffffff"/>
    </style:style>
    <style:style style:name="P16" style:family="paragraph" style:parent-style-name="Standard" style:list-style-name="L4">
      <style:paragraph-properties style:line-height-at-least="0.198in"/>
      <style:text-properties fo:color="#3b3b3b" loext:opacity="100%" style:font-name="Droid Sans Mono" fo:font-size="10.5pt" fo:font-weight="normal" officeooo:rsid="00139a6c" officeooo:paragraph-rsid="00139a6c" fo:background-color="#ffffff"/>
    </style:style>
    <style:style style:name="P17" style:family="paragraph" style:parent-style-name="Standard" style:list-style-name="L4">
      <style:paragraph-properties style:line-height-at-least="0.198in"/>
      <style:text-properties fo:color="#3b3b3b" loext:opacity="100%" style:font-name="Droid Sans Mono" fo:font-size="10.5pt" fo:font-weight="normal" officeooo:rsid="001468f9" officeooo:paragraph-rsid="001468f9" fo:background-color="#ffffff"/>
    </style:style>
    <style:style style:name="P18"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19"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0d1c02" fo:background-color="#ffffff"/>
    </style:style>
    <style:style style:name="P20" style:family="paragraph" style:parent-style-name="Standard">
      <style:text-properties fo:color="#800000" loext:opacity="100%" style:font-name="Droid Sans Mono" fo:font-size="10.5pt" fo:font-weight="bold" officeooo:rsid="000d1c02" officeooo:paragraph-rsid="000d1c02" fo:background-color="#ffffff"/>
    </style:style>
    <style:style style:name="P21" style:family="paragraph" style:parent-style-name="Standard">
      <style:paragraph-properties style:line-height-at-least="0.198in"/>
    </style:style>
    <style:style style:name="P2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23"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24"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25"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26"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style:style>
    <style:style style:name="T1" style:family="text">
      <style:text-properties officeooo:rsid="000d1c02"/>
    </style:style>
    <style:style style:name="T2" style:family="text">
      <style:text-properties fo:background-color="transparent" loext:char-shading-value="0"/>
    </style:style>
    <style:style style:name="T3" style:family="text">
      <style:text-properties fo:color="#188038" loext:opacity="100%" style:font-name="Roboto Mono" fo:background-color="transparent" loext:char-shading-value="0"/>
    </style:style>
    <style:style style:name="T4" style:family="text">
      <style:text-properties fo:color="#3b3b3b" loext:opacity="100%" fo:font-weight="normal" officeooo:rsid="000d1c02"/>
    </style:style>
    <style:style style:name="T5" style:family="text">
      <style:text-properties officeooo:rsid="000e01d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First-Principles Implementation/Validation of Embedded Inertial MEKF for Tilt Estimation on ESP32 under FreeRTOS </text:p>
      <text:p text:style-name="P21"/>
      <text:p text:style-name="P18">## Learning Objective</text:p>
      <text:p text:style-name="P4">My learning objective is to demonstrate (i) that I’m able to implement, from first-principles, in firmware, under FreeRTOS, on an ESP32, a multiplicative extended Kalman filter (MEKF) that correctly estimates the angular tilt of an LSM6DS33 6-axis MEMS gyroscope-accelerometer IMU, embedded on a MinIMU-9 v5 IMU breakout board, (ii) that I’m able to explain, in a coherent way, the implementation process–from deciphering the underpinning mathematics and logic of the MEKF, to understanding how the I2C sensor register reads work, to organizing the project for an RTOS, to finally carrying out simple manual tests that confirm the filter achieved its intended purpose. </text:p>
      <text:p text:style-name="P21"/>
      <text:p text:style-name="P18">## Technical Problem Statement</text:p>
      <text:p text:style-name="P4">Implement, under FreeRTOS, on an ESP32, an MEKF (multiplicative extended Kalman filter) that correctly determines, from LSM6DS33 gyroscope and accelerometer measurements, the angular tilt of the LSM6DS33 embedded on the MinIMU-9 v5 IMU breakout board. Here, the term “angular tilt” refers to a description of angular orientation that includes only the roll and pitch angular degrees of freedom (DoFs), not the yaw DoF, which indicates rotation about the gravity “down” direction in the inertial reference frame. </text:p>
      <text:p text:style-name="P11"/>
      <text:p text:style-name="P19">## <text:span text:style-name="T1">Solution Process</text:span><text:span text:style-name="T4"> </text:span></text:p>
      <text:list text:style-name="L4">
        <text:list-item>
          <text:p text:style-name="P16">Decide on an RTOS architecture</text:p>
        </text:list-item>
        <text:list-item>
          <text:p text:style-name="P16">Implement driver code</text:p>
        </text:list-item>
        <text:list-item>
          <text:p text:style-name="P16">Calibrate the accel </text:p>
          <text:list>
            <text:list-item>
              <text:p text:style-name="P17">Show the assumed calibration rule</text:p>
            </text:list-item>
            <text:list-item>
              <text:p text:style-name="P17">Show the six-pose over-constrained system of equations</text:p>
            </text:list-item>
            <text:list-item>
              <text:p text:style-name="P17">Write the solution to the system of equations</text:p>
            </text:list-item>
            <text:list-item>
              <text:p text:style-name="P17">Show the parameters in a table</text:p>
            </text:list-item>
            <text:list-item>
              <text:p text:style-name="P17"/>
            </text:list-item>
          </text:list>
        </text:list-item>
        <text:list-item>
          <text:p text:style-name="P16">Calibrate the gyro </text:p>
        </text:list-item>
        <text:list-item>
          <text:p text:style-name="P16">Assess the zero-mean Gaussian gyro noise</text:p>
        </text:list-item>
        <text:list-item>
          <text:p text:style-name="P16">Implement the prediction step</text:p>
          <text:list>
            <text:list-item>
              <text:p text:style-name="P16">P is PSD</text:p>
              <text:list>
                <text:list-item>
                  <text:p text:style-name="P16">Symmetric</text:p>
                </text:list-item>
                <text:list-item>
                  <text:p text:style-name="P16">min(eigs) &gt;= 0</text:p>
                </text:list-item>
              </text:list>
            </text:list-item>
            <text:list-item>
              <text:p text:style-name="P16">q_hat drifts in all DoFs</text:p>
            </text:list-item>
          </text:list>
        </text:list-item>
        <text:list-item>
          <text:p text:style-name="P16">Implement the update step</text:p>
          <text:list>
            <text:list-item>
              <text:p text:style-name="P16">P is PSD</text:p>
            </text:list-item>
            <text:list-item>
              <text:p text:style-name="P16">Qd is PSD</text:p>
            </text:list-item>
            <text:list-item>
              <text:p text:style-name="P16">R is PD?</text:p>
            </text:list-item>
            <text:list-item>
              <text:p text:style-name="P16">q_hat drifts in only one DoF </text:p>
            </text:list-item>
          </text:list>
        </text:list-item>
        <text:list-item>
          <text:p text:style-name="P16">Validate the tilt against geometry</text:p>
          <text:list>
            <text:list-item>
              <text:p text:style-name="P16">0, 18, 36, -18, -36 initialized from the no-rotation quaternion. </text:p>
            </text:list-item>
            <text:list-item>
              <text:p text:style-name="P17">Barrel roll check: spin the sensor ~360 about each axis and check tilt is as expected</text:p>
            </text:list-item>
          </text:list>
        </text:list-item>
      </text:list>
      <text:p text:style-name="P15"/>
      <text:p text:style-name="P15"/>
      <text:list text:continue-numbering="true" text:style-name="L4">
        <text:list-item>
          <text:p text:style-name="P14">Designed an RTOS architecture to enable IMU sampling at 208 Hz, Kalman Filtering, and logging of intermediate calculations for verification and validation. </text:p>
        </text:list-item>
        <text:list-item>
          <text:p text:style-name="P14"><text:soft-page-break/>Implemented an LSM6DS33 driver the provides an interface for the configuration of the LSM6DS33, the repeated sampling of the accelerometer and data registers when new data is ready, and the scaling of the raw ADC counts to physical units. </text:p>
          <text:p text:style-name="P16"/>
        </text:list-item>
        <text:list-item>
          <text:p text:style-name="P14">Calibrated the LSM6DS33 accelerometer with a six-pose calibration approach and affine calibration math model solved with least-squares. <text:s/></text:p>
        </text:list-item>
        <text:list-item>
          <text:p text:style-name="P14">Calibrated the LSM6DS33 gyroscope </text:p>
        </text:list-item>
      </text:list>
      <text:p text:style-name="P15"/>
      <text:list text:continue-numbering="true" text:style-name="L4">
        <text:list-item>
          <text:p text:style-name="P14">Implemented an LSM6DS33 driver module to configure the LSM6DS33 ranges and ODR and also provide functionality to sample the gyro and accelerometer data registers at approximately the ODR </text:p>
        </text:list-item>
        <text:list-item>
          <text:p text:style-name="P13"/>
        </text:list-item>
        <text:list-item>
          <text:p text:style-name="P13"/>
        </text:list-item>
        <text:list-item>
          <text:p text:style-name="P13">I decide on a project architecture to handle IMU sampling, gyro/accel fusion, and debug logging. </text:p>
        </text:list-item>
        <text:list-item>
          <text:p text:style-name="P13">I implement a </text:p>
        </text:list-item>
        <text:list-item>
          <text:p text:style-name="P13"/>
        </text:list-item>
        <text:list-item>
          <text:p text:style-name="P13">Developed LSM6DS33 driver to configure the LSM6DS33 to 208 Hz ODR, these full-scale ranges, etc. </text:p>
        </text:list-item>
        <text:list-item>
          <text:p text:style-name="P13">Calibrated the accelerometer with a six-pose calibration routine</text:p>
        </text:list-item>
        <text:list-item>
          <text:p text:style-name="P12"/>
        </text:list-item>
        <text:list-item>
          <text:p text:style-name="P12"/>
        </text:list-item>
        <text:list-item>
          <text:p text:style-name="P12"/>
        </text:list-item>
        <text:list-item>
          <text:p text:style-name="P12">Project needs gyro and accelerometer measurements at consistent time increments. Develop a driver to read the samples, then wrap driver calls an RTOS polling loop. </text:p>
        </text:list-item>
        <text:list-item>
          <text:p text:style-name="P12">Accelerometer and gyroscope must be calibrated before their data can be used for sensor fusion calculations. </text:p>
          <text:list>
            <text:list-item>
              <text:p text:style-name="P12">Decide of calibration models and procedures. </text:p>
            </text:list-item>
            <text:list-item>
              <text:p text:style-name="P12">Design and built a calibration stand for both calibration procedures.</text:p>
            </text:list-item>
            <text:list-item>
              <text:p text:style-name="P12">Calibrate the gyroscope by determining the constant offsets, then hard-coding those offsets into the firmware. </text:p>
            </text:list-item>
            <text:list-item>
              <text:p text:style-name="P12">Calibrate the accelerometer by solving for an affine model with least-squares. </text:p>
            </text:list-item>
          </text:list>
        </text:list-item>
        <text:list-item>
          <text:p text:style-name="P12"/>
        </text:list-item>
        <text:list-item>
          <text:p text:style-name="P8"/>
        </text:list-item>
        <text:list-item>
          <text:p text:style-name="P8"/>
        </text:list-item>
        <text:list-item>
          <text:p text:style-name="P8">Decided on a project architecture <text:span text:style-name="T5">with tasks for this, queues for this, and data structures for this. </text:span></text:p>
        </text:list-item>
        <text:list-item>
          <text:p text:style-name="P8">Implemented, referencing the LSM6DS33 datasheet, the LSM6DS33 driver code that configures the LSM6DS33 for these options and allows for sampling the IMU via the ESP32 I2C bus. </text:p>
        </text:list-item>
        <text:list-item>
          <text:p text:style-name="P9"><text:span text:style-name="T5">D</text:span>esigned in Autodesk Fusion and 3D printed <text:span text:style-name="T5">a leveling tilt stand to calibrate the sensor. </text:span></text:p>
        </text:list-item>
        <text:list-item>
          <text:p text:style-name="P8">Calibrated the gyroscope. <text:s/>This is the gyroscope process model. The assumption is that the bias is a vector that evolves according to a random walk. </text:p>
        </text:list-item>
        <text:list-item>
          <text:p text:style-name="P8">Assessed the gyroscope noise against the assumed MEKF noise model (zero-mean Gaussian white). To assess Gaussianity I collected X seconds of samples, then plotted histograms of mean-subtracted measurements. The histograms suggest these ideas. The LSP suggests noise is not white. </text:p>
        </text:list-item>
        <text:list-item>
          <text:p text:style-name="P8">Determined the initial covariance matrix to use for the propagation model and for the update model, based on empirical data. </text:p>
        </text:list-item>
        <text:list-item>
          <text:p text:style-name="P8"><text:soft-page-break/>Calibrated the accelerometer. This involved a six pose calibration routine. I collected X minutes of samples in each of those poses. The average of each point was taken and used to built an affine best fit model solved with least squares. This is the math model for that.</text:p>
        </text:list-item>
        <text:list-item>
          <text:p text:style-name="P8"><text:s/>Implemented the prediction step. Implemented supporting math functions. Built embedded logging statements and post-processing scripts to help verify the prediction step. This involved assessing the time evolution of the state estimate covariance matrix. This is the evolution of eigenvalues, etc. </text:p>
        </text:list-item>
        <text:list-item>
          <text:p text:style-name="P8">Implemented the update step. Implemented the supporting math functions. Built logging and post-processing steps to assess structural properties of the innovation covariance matrix and estimated quaternion. </text:p>
        </text:list-item>
        <text:list-item>
          <text:p text:style-name="P8">3D printed a validation test fixture in Auto desk fusion that allows for setting at ground-truth tilt orientations. It’s a ball and socket mechanism. Here’s a picture. </text:p>
        </text:list-item>
        <text:list-item>
          <text:p text:style-name="P10">Validated that the filter demonstrates expected response to stationary ground-truth poses on the test fixture. The drift around the ground truth is exactly as expected. This is because the gyro-accel model is not a fully observable system. Intuitively, the accelerometer is providing information on how level the sensor is relative to the ground plane. There are an infinite number of orientations that are perfectly level with the ground plane, if its imagined spinning that plane around an axis perpendicular to the plane. Thus, if parameterize the rotation matrix with Euler angles, yaw can be thought of as being unconstrained while roll and pitch are constrained—and that’s what the trajectory plots show. If I were to assemble an observability matrix from the system state matrices across time, the rank would always be less than the state estimation dimension. </text:p>
        </text:list-item>
      </text:list>
      <text:p text:style-name="P6"/>
      <text:list text:continue-numbering="true" text:style-name="L4">
        <text:list-item>
          <text:p text:style-name="P7">main.c, fusion.c, math_lib.c, and imu.c. </text:p>
        </text:list-item>
        <text:list-item>
          <text:p text:style-name="P7"/>
        </text:list-item>
        <text:list-item>
          <text:p text:style-name="P7"/>
        </text:list-item>
        <text:list-item>
          <text:p text:style-name="P7"/>
        </text:list-item>
        <text:list-item>
          <text:p text:style-name="P7">Opened an empty ESP-IDF project. In SDK Configuration manager, set FreeRTOS Kernal `configTICK_RATE_HZ` to 1000 Hz. Set Created skeletons for `main.c`, `fusion.c`, `imu.c`, `math_lib.c`. Imported necessary headers, including RTOS task, queue, FreeRTOS, sdkconfig, floating point math, esp_timer, and esp_log. Set the SCL/SDA GPIO Number to match the pin I wired the sensor to.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3"/>
      <text:h text:style-name="P2" text:outline-level="1"><text:bookmark text:name="docs-internal-guid-f1670316-7fff-c8e8-bc18-461f46723d89"/>Solution Process</text:h>
      <text:p text:style-name="P22">The following steps describe how I implemented and validated the MEKF.</text:p>
      <text:list text:style-name="L1">
        <text:list-item>
          <text:p text:style-name="P23">Initialized an empty ESP-IDF project, configured both the ESP32 I2C SDA/SCL pins and the RTOS_TICK_RATE in Menuconfig, then organized the project with an RTOS architecture having one task for polling the LSM6DS33, another task for the the MEKF fusion, and a queue for transferring timestamped, scaled gyroscope/accelerometer measurements from the polling task to the fusion task.   </text:p>
        </text:list-item>
        <text:list-item>
          <text:p text:style-name="P26"><text:span text:style-name="T2">Implemented a custom LSM6DS33 driver (</text:span><text:span text:style-name="T3">imu.h/.c</text:span><text:span text:style-name="T2">) that handles configuring both the gyroscope and the accelerometer of the LSM6DS33 for a 208 Hz output data rate (ODR), the gyroscope full-scale range (FSR) to 245 dps, and the accelerometer FSR to ±2 g, and also handles I2C operations for reading the gyro and accelerometer readings the LSM6DS33 writes to these registers.</text:span></text:p>
        </text:list-item>
        <text:list-item>
          <text:p text:style-name="P23">Inspect noise data. Conclude (i) that the zero-mean Gaussian assumption regarding the gyroscope process noise is reasonable on the grounds that a sampled series of gyroscope measurements taken with  the gyro resting stationary produces a series of distributions that each resemble the normal distribution and (ii) that while the gyro noise itself is white, the process noise is definitely not white due to the peaks in the Lomb-Scargle Periodogram. Apply the offsets to firmware to calibrate the gyroscope according to the math model w_meas = w_true + b. </text:p>
        </text:list-item>
        <text:list-item>
          <text:p text:style-name="P23">To support accurate-as-possible readings from the accelerometer, calibrate the accelerometer against an affine mathematical model a_meas = A * a_true + b. </text:p>
        </text:list-item>
      </text:list>
      <text:p text:style-name="Text_20_body"><text:line-break/><text:line-break/><text:line-break/></text:p>
      <text:p text:style-name="P22">To solve the MEKF implementation/validation problem, I took the following steps. </text:p>
      <text:list text:style-name="L2">
        <text:list-item>
          <text:p text:style-name="P24">Initialize the ESP32 project, then organize the project for an RTOS with tasks for reading LSM6DS33 and for the MEKF and queues for passing raw LSM6DS33 measurements and for passing fused orientations to the UART peripheral. </text:p>
        </text:list-item>
        <text:list-item>
          <text:p text:style-name="P24">Implement a custom LSM6DS33 driver that configures the sensor to 208 Hz ODR, X G accelerometer full-scale range and Y rad/s gyro full-scale range, then polls the IMU at <text:soft-page-break/>approximately the ODR frequency. Confirm correctness of this step by verifying register values at boot. </text:p>
        </text:list-item>
        <text:list-item>
          <text:p text:style-name="P24">Inspect the sensor noise to determine to what extent the zero-mean Gaussian noise assumption holds with a periodogram rather than an FFT since the polling data is not uniformly spaced in time. </text:p>
        </text:list-item>
        <text:list-item>
          <text:p text:style-name="P24">Calibrate the accelerometer, using a 6-pose routine and an affine fit calibration model, and gyroscope, using a fixed-offset vector model, for accurate-as-possible data collection. </text:p>
        </text:list-item>
        <text:list-item>
          <text:p text:style-name="P24">Implement a C library of functions that perform the mathematical operations employed for the MEKF, including matrix-vector products, matrix-matrix products, the matrix exponential, cross product matrix operations, matrix assembly operations, first-order quaternion integration, quaternion multiplication, quaternion-to-rotation matrix operations, and vector and quaternion normalizing operations. </text:p>
        </text:list-item>
        <text:list-item>
          <text:p text:style-name="P24">Implement the prediction step of the MEKF and verify correctness by checking unbounded growth of state covariance, small symmetry error as measured by Frobenius norm, and positive semi-definite property of the covariance matrix. </text:p>
        </text:list-item>
        <text:list-item>
          <text:p text:style-name="P24">[Probably] Implement the correction step of the MEKF, verifying correctness by analysis of the innovation covariance matrix, including PSD and symmetry. </text:p>
        </text:list-item>
        <text:list-item>
          <text:p text:style-name="P24">[Probably] Validated the MEKF against ground truth pose points (6 distinct points for 1 minute each, record time to converge and steady state error).</text:p>
        </text:list-item>
        <text:list-item>
          <text:p text:style-name="P24">[Probably] Manual test for sign check and full rotations -&gt; Does the quaternion rotate in the expected direction throughout large angle sweeps of more than 360 degrees? </text:p>
        </text:list-item>
        <text:list-item>
          <text:p text:style-name="P24">[Probably] Does the quaternion drift when the sensor is in free fall on a free fall stand? (I can actually accelerate it down and up while it maintains the same orientation). </text:p>
        </text:list-item>
      </text:list>
      <text:h text:style-name="P1" text:outline-level="1">Supporting Points</text:h>
      <text:list text:style-name="L3">
        <text:list-item>
          <text:p text:style-name="P25">This is a histogram that shows the gyro rate noise. This supports the notion that the noise is zero-mean Gaussian. A guess of the gyro biases can also be extracted from these plots.</text:p>
        </text:list-item>
        <text:list-item>
          <text:p text:style-name="P25">This is a plot of the frequency response of the stationary gyro data, suggesting that the process noise is not idealized white noise, though these peaks may be caused by external vibrations.</text:p>
        </text:list-item>
        <text:list-item>
          <text:p text:style-name="P25">This is a plot showing the result of the calibration model, suggesting that the model brings points closer to the assumed ground truth values. </text:p>
        </text:list-item>
        <text:list-item>
          <text:p text:style-name="P25">This plot shows the trace of the covariance growing unbounded when only the prediction step is implemented, which conforms to the expected behavior because the covariance evolves according to this equation. </text:p>
        </text:list-item>
        <text:list-item>
          <text:p text:style-name="P25">This table documents the math library I build, showing the title of the function, the inputs, and the outputs. </text:p>
        </text:list-item>
        <text:list-item>
          <text:p text:style-name="P25">This plot shows the minimum eigenvalue of the covariance matrix remaining non-negative, which is sufficient for the state covariance being positive semi-definite. This other plot shows, via a ratio of Frobenius norms, that the matrix remains approximately symmetric. <text:soft-page-break/>These two conditions are sufficient to show that the covariance matrix keeps the structure of a covariance matrix intact. </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Ubuntu" svg:font-family="Ubuntu,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1T00:07:42.057501732</meta:creation-date>
    <dc:date>2026-05-03T14:32:44.794739676</dc:date>
    <meta:editing-duration>PT13H42M12S</meta:editing-duration>
    <meta:editing-cycles>2</meta:editing-cycles>
    <meta:generator>LibreOffice/24.2.7.2$Linux_X86_64 LibreOffice_project/420$Build-2</meta:generator>
    <meta:document-statistic meta:table-count="0" meta:image-count="0" meta:object-count="0" meta:page-count="6" meta:paragraph-count="95" meta:word-count="1876" meta:character-count="11857" meta:non-whitespace-character-count="10088"/>
  </office:meta>
</office:document-meta>
</file>